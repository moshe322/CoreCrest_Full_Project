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top="0cm" fo:margin-bottom="0cm" style:contextual-spacing="false"/>
      <style:text-properties officeooo:paragraph-rsid="001f5f24"/>
    </style:style>
    <style:style style:name="P2" style:family="paragraph" style:parent-style-name="Heading_20_2">
      <style:paragraph-properties fo:margin-top="0cm" fo:margin-bottom="0cm" style:contextual-spacing="false"/>
    </style:style>
    <style:style style:name="P3" style:family="paragraph" style:parent-style-name="Standard">
      <style:paragraph-properties fo:text-align="start" style:justify-single-word="false"/>
      <style:text-properties style:font-name="Nimbus Roman" fo:font-size="14pt" fo:font-weight="bold" officeooo:paragraph-rsid="0019651e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Nimbus Roman" fo:font-size="14pt" officeooo:paragraph-rsid="0019651e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Nimbus Roman" fo:font-size="14pt" officeooo:paragraph-rsid="0019e61b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Nimbus Roman" fo:font-size="14pt" officeooo:paragraph-rsid="001e036a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Nimbus Roman" fo:font-size="14pt" officeooo:paragraph-rsid="001f5f24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Nimbus Roman" fo:font-size="13pt" fo:font-weight="bold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Nimbus Roman" fo:font-size="13pt" fo:font-weight="bold" officeooo:paragraph-rsid="0019651e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Nimbus Roman" fo:font-size="13pt" fo:font-weight="bold" officeooo:paragraph-rsid="0019651e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Nimbus Roman" fo:font-size="13pt" officeooo:paragraph-rsid="0019651e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style:font-name="Nimbus Roman" fo:font-size="13pt" officeooo:paragraph-rsid="0019651e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style:font-name="Nimbus Roman" fo:font-size="13pt" officeooo:paragraph-rsid="001ad32c" style:font-size-asian="13pt" style:font-size-complex="13pt"/>
    </style:style>
    <style:style style:name="P14" style:family="paragraph" style:parent-style-name="Standard">
      <style:paragraph-properties fo:margin-top="0.302cm" fo:margin-bottom="0.302cm" style:contextual-spacing="false" fo:text-align="start" style:justify-single-word="false"/>
      <style:text-properties style:font-name="Nimbus Roman" fo:font-size="13pt" officeooo:paragraph-rsid="00204053" style:font-size-asian="13pt" style:font-size-complex="13pt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style:font-name="Nimbus Roman" fo:font-size="13pt" officeooo:paragraph-rsid="00204053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style:font-name="Nimbus Roman" fo:font-size="13pt" officeooo:rsid="0019651e" officeooo:paragraph-rsid="0019651e" style:font-size-asian="13pt" style:font-size-complex="13pt"/>
    </style:style>
    <style:style style:name="P17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Nimbus Roman" fo:font-size="13pt" officeooo:rsid="0019651e" officeooo:paragraph-rsid="0019651e" style:font-size-asian="13pt" style:font-size-complex="13pt"/>
    </style:style>
    <style:style style:name="P18" style:family="paragraph" style:parent-style-name="Standard">
      <style:paragraph-properties fo:text-align="start" style:justify-single-word="false"/>
      <style:text-properties style:font-name="Nimbus Roman" fo:font-size="13pt" officeooo:rsid="0019651e" officeooo:paragraph-rsid="0019e61b" style:font-size-asian="13pt" style:font-size-complex="13pt"/>
    </style:style>
    <style:style style:name="P19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Nimbus Roman" fo:font-size="13pt" officeooo:rsid="0019651e" officeooo:paragraph-rsid="0019e61b" style:font-size-asian="13pt" style:font-size-complex="13pt"/>
    </style:style>
    <style:style style:name="P20" style:family="paragraph" style:parent-style-name="Standard">
      <style:paragraph-properties fo:text-align="start" style:justify-single-word="false"/>
      <style:text-properties style:font-name="Nimbus Roman" fo:font-size="13pt" fo:font-style="italic" officeooo:paragraph-rsid="001ad32c" style:font-size-asian="13pt" style:font-style-asian="italic" style:font-size-complex="13pt" style:font-style-complex="italic"/>
    </style:style>
    <style:style style:name="P21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Nimbus Roman" fo:font-size="13pt" fo:font-weight="normal" officeooo:rsid="0019651e" officeooo:paragraph-rsid="0019651e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Nimbus Roman" fo:font-size="13pt" fo:font-weight="normal" officeooo:rsid="0019651e" officeooo:paragraph-rsid="0019651e" style:font-size-asian="13pt" style:font-weight-asian="normal" style:font-size-complex="13pt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officeooo:paragraph-rsid="001f5f24"/>
    </style:style>
    <style:style style:name="P24" style:family="paragraph" style:parent-style-name="Standard" style:list-style-name="L5">
      <style:paragraph-properties fo:text-align="start" style:justify-single-word="false"/>
      <style:text-properties officeooo:paragraph-rsid="001f5f24"/>
    </style:style>
    <style:style style:name="P25" style:family="paragraph" style:parent-style-name="Text_20_body" style:list-style-name="L1"/>
    <style:style style:name="P26" style:family="paragraph" style:parent-style-name="Text_20_body" style:list-style-name="L1">
      <style:paragraph-properties fo:margin-top="0cm" fo:margin-bottom="0cm" style:contextual-spacing="false"/>
    </style:style>
    <style:style style:name="P27" style:family="paragraph" style:parent-style-name="Text_20_body">
      <style:paragraph-properties fo:margin-top="0cm" fo:margin-bottom="0cm" style:contextual-spacing="false"/>
    </style:style>
    <style:style style:name="P28" style:family="paragraph" style:parent-style-name="Text_20_body" style:list-style-name="L2"/>
    <style:style style:name="P29" style:family="paragraph" style:parent-style-name="Text_20_body" style:list-style-name="L2">
      <style:paragraph-properties fo:margin-top="0cm" fo:margin-bottom="0cm" style:contextual-spacing="false"/>
    </style:style>
    <style:style style:name="P30" style:family="paragraph" style:parent-style-name="Text_20_body" style:list-style-name="L2">
      <style:paragraph-properties fo:margin-top="0cm" fo:margin-bottom="0cm" style:contextual-spacing="false"/>
      <style:text-properties officeooo:paragraph-rsid="001f5f24"/>
    </style:style>
    <style:style style:name="P31" style:family="paragraph" style:parent-style-name="Text_20_body" style:list-style-name="L7">
      <style:paragraph-properties fo:text-align="start" style:justify-single-word="false"/>
      <style:text-properties style:font-name="Nimbus Roman" fo:font-size="14pt" officeooo:paragraph-rsid="001f5f24" style:font-size-asian="14pt" style:font-size-complex="14pt"/>
    </style:style>
    <style:style style:name="P32" style:family="paragraph" style:parent-style-name="Text_20_body" style:list-style-name="L4"/>
    <style:style style:name="P33" style:family="paragraph" style:parent-style-name="Text_20_body" style:list-style-name="L4">
      <style:paragraph-properties fo:margin-top="0cm" fo:margin-bottom="0cm" style:contextual-spacing="false"/>
    </style:style>
    <style:style style:name="P34" style:family="paragraph" style:parent-style-name="Text_20_body" style:list-style-name="L6"/>
    <style:style style:name="P35" style:family="paragraph" style:parent-style-name="Text_20_body" style:list-style-name="L6">
      <style:paragraph-properties fo:margin-top="0cm" fo:margin-bottom="0cm" style:contextual-spacing="false"/>
    </style:style>
    <style:style style:name="P36" style:family="paragraph" style:parent-style-name="Text_20_body" style:list-style-name="L8"/>
    <style:style style:name="P37" style:family="paragraph" style:parent-style-name="Text_20_body" style:list-style-name="L8">
      <style:paragraph-properties fo:margin-top="0cm" fo:margin-bottom="0cm" style:contextual-spacing="false"/>
    </style:style>
    <style:style style:name="P38" style:family="paragraph" style:parent-style-name="Text_20_body" style:list-style-name="L9">
      <style:paragraph-properties fo:margin-top="0cm" fo:margin-bottom="0cm" style:contextual-spacing="false"/>
    </style:style>
    <style:style style:name="P39" style:family="paragraph" style:parent-style-name="Text_20_body" style:list-style-name="L9">
      <style:text-properties officeooo:paragraph-rsid="001f5f24"/>
    </style:style>
    <style:style style:name="P40" style:family="paragraph" style:parent-style-name="Text_20_body" style:list-style-name="L10"/>
    <style:style style:name="P41" style:family="paragraph" style:parent-style-name="Text_20_body" style:list-style-name="L10">
      <style:paragraph-properties fo:margin-top="0cm" fo:margin-bottom="0cm" style:contextual-spacing="false"/>
    </style:style>
    <style:style style:name="P42" style:family="paragraph" style:parent-style-name="Text_20_body" style:list-style-name="L11">
      <style:paragraph-properties fo:margin-top="0cm" fo:margin-bottom="0cm" style:contextual-spacing="false"/>
    </style:style>
    <style:style style:name="P43" style:family="paragraph" style:parent-style-name="Text_20_body" style:list-style-name="L11">
      <style:text-properties officeooo:paragraph-rsid="00204053"/>
    </style:style>
    <style:style style:name="P44" style:family="paragraph" style:parent-style-name="Text_20_body">
      <style:text-properties officeooo:paragraph-rsid="00204053"/>
    </style:style>
    <style:style style:name="P45" style:family="paragraph">
      <style:paragraph-properties fo:text-align="center"/>
    </style:style>
    <style:style style:name="T1" style:family="text">
      <style:text-properties officeooo:rsid="0019651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651e" style:font-weight-asian="bold" style:font-weight-complex="bold"/>
    </style:style>
    <style:style style:name="T4" style:family="text">
      <style:text-properties fo:font-weight="bold" officeooo:rsid="0019e61b" style:font-weight-asian="bold" style:font-weight-complex="bold"/>
    </style:style>
    <style:style style:name="T5" style:family="text">
      <style:text-properties fo:font-weight="bold" officeooo:rsid="001ad32c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9651e" style:font-weight-asian="normal" style:font-weight-complex="normal"/>
    </style:style>
    <style:style style:name="T8" style:family="text">
      <style:text-properties style:font-name="Nimbus Roman" fo:font-size="14pt" style:font-size-asian="14pt" style:font-size-complex="14pt"/>
    </style:style>
    <style:style style:name="T9" style:family="text">
      <style:text-properties style:font-name="Nimbus Roman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Nimbus Roman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Nimbus Roman" fo:font-size="12pt" style:font-size-asian="12pt" style:font-size-complex="12pt"/>
    </style:style>
    <style:style style:name="T12" style:family="text">
      <style:text-properties style:font-name="Nimbus Roman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Nimbus Roman" fo:font-size="13pt" style:font-size-asian="13pt" style:font-size-complex="13pt"/>
    </style:style>
    <style:style style:name="T14" style:family="text">
      <style:text-properties style:font-name="Nimbus Roman" fo:font-size="13pt" officeooo:rsid="00204053" style:font-size-asian="13pt" style:font-size-complex="13pt"/>
    </style:style>
    <style:style style:name="T15" style:family="text">
      <style:text-properties officeooo:rsid="001e036a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204053" style:font-size-asian="12pt" style:font-size-complex="12pt"/>
    </style:style>
    <style:style style:name="T18" style:family="text">
      <style:text-properties fo:font-size="12pt" fo:font-weight="bold" style:font-size-asian="12pt" style:font-weight-asian="bold" style:font-size-complex="12pt" style:font-weight-complex="bold"/>
    </style:style>
    <style:style style:name="T19" style:family="text">
      <style:text-properties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officeooo:rsid="00204053" style:font-size-asian="14pt" style:font-size-complex="14pt"/>
    </style:style>
    <style:style style:name="T22" style:family="text">
      <style:text-properties officeooo:rsid="00204053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fo:font-size="13pt" officeooo:rsid="00204053" style:font-size-asian="13pt" style:font-size-complex="13pt"/>
    </style:style>
    <style:style style:name="T25" style:family="text">
      <style:text-properties officeooo:rsid="0021a7d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OSHE THAMMULURI</text:p>
      <text:p text:style-name="P8">tmoshe52@gmail.com | +91-6301996840</text:p>
      <text:p text:style-name="P9">LinkedIn: linkedin.com/in/thammuluri-moshe-589569231</text:p>
      <text:p text:style-name="P11"><draw:line text:anchor-type="paragraph" draw:z-index="0" draw:name="Line 1" draw:style-name="gr1" draw:text-style-name="P45" svg:x1="18.62cm" svg:y1="0.34cm" svg:x2="-0.192cm" svg:y2="0.345cm"><text:p/></draw:line></text:p>
      <text:p text:style-name="P10"/>
      <text:p text:style-name="P10">PROFESSIONAL SUMMARY</text:p>
      <text:p text:style-name="P12">Results-driven DevOps Engineer with 2+ years of hands-on experience in CI/CD automation,</text:p>
      <text:p text:style-name="P12">containerization, Kubernetes orchestration, and multi-cloud infrastructure management. Strong</text:p>
      <text:p text:style-name="P12">expertise in AWS, Azure, and DigitalOcean cloud environments, Infrastructure as Code (Terraform),</text:p>
      <text:p text:style-name="P12">and production monitoring. Proven track record of reducing deployment time, improving system</text:p>
      <text:p text:style-name="P12">reliability, and building scalable, highly available microservices architectures.</text:p>
      <text:p text:style-name="P12"/>
      <text:p text:style-name="P10">TECHNICAL SKILLS: <text:s text:c="35"/></text:p>
      <text:p text:style-name="P13"><text:span text:style-name="T3">Category <text:s text:c="59"/>Tools &amp; Technologies</text:span></text:p>
      <text:p text:style-name="P20"><text:span text:style-name="T3">Version Control <text:s text:c="48"/>Git, GitHub</text:span></text:p>
      <text:p text:style-name="P20"><text:span text:style-name="T3">CI/CD Automation <text:s text:c="43"/>GitLab CI/CD, Jenkins, Azure Pipelines, Aws Devops</text:span></text:p>
      <text:p text:style-name="P20"><text:span text:style-name="T3">Containerization <text:s text:c="47"/></text:span><text:span text:style-name="T5">Docker</text:span></text:p>
      <text:p text:style-name="P20"><text:span text:style-name="T3">Container Orchestration <text:s text:c="34"/>Kubernetes (EKS, DOKS, AKS) </text:span></text:p>
      <text:p text:style-name="P20"><text:span text:style-name="T3">Monitoring &amp; Logging <text:s text:c="37"/>Prometheus, Grafana, Loki, Node_Exporter, Promtail</text:span></text:p>
      <text:p text:style-name="P20"><text:span text:style-name="T3">Infrastructure as Code <text:s text:c="37"/></text:span><text:span text:style-name="T5">Terraform (AWS, Azure, DigitalOcean) </text:span></text:p>
      <text:p text:style-name="P20"><text:span text:style-name="T3">Deployment &amp; Server <text:s text:c="39"/>Ubuntu (Nginx), Windows Server (IIS</text:span><text:span text:style-name="T5">)</text:span></text:p>
      <text:p text:style-name="P20"><text:span text:style-name="T3">Databases <text:s text:c="58"/>PostgreSQL, MySQL</text:span></text:p>
      <text:p text:style-name="P20"><text:span text:style-name="T3">AI</text:span><text:span text:style-name="T4">(Artificial Intelligence)</text:span><text:span text:style-name="T3"> <text:s text:c="33"/>ChatGpt, GEMINI, DeepSeek.</text:span></text:p>
      <text:p text:style-name="P16"><draw:line text:anchor-type="paragraph" draw:z-index="1" draw:name="Line 2" draw:style-name="gr1" draw:text-style-name="P45" svg:x1="19.059cm" svg:y1="0.245cm" svg:x2="-0.203cm" svg:y2="0.404cm"><text:p/></draw:line><text:span text:style-name="T2"/></text:p>
      <text:p text:style-name="P16"><text:span text:style-name="T2"/></text:p>
      <text:p text:style-name="P16"><text:span text:style-name="T2">EXPERIENCE</text:span></text:p>
      <text:p text:style-name="P16"><text:span text:style-name="T2"/></text:p>
      <text:p text:style-name="P16"><text:span text:style-name="T2">DevOps Engineer</text:span></text:p>
      <text:p text:style-name="P16"><text:span text:style-name="T2">ScriptBees IT Pvt Ltd | Jun 2023 – Jul 2025</text:span></text:p>
      <text:p text:style-name="P17"><text:span text:style-name="T2">Projects:</text:span></text:p>
      <text:p text:style-name="P18"><text:span text:style-name="T2">NIXA (Automatic Deployment Microservice): </text:span><text:span text:style-name="T6">Implemented gitlab, docker, terraform, and</text:span></text:p>
      <text:p text:style-name="P21">Kubernetes deployments across clouds.</text:p>
      <text:p text:style-name="P19"><text:span text:style-name="T2">SimplyTrack(Vehicle Tracking Microservice): </text:span><text:span text:style-name="T6">Managed gitlab docker services, psql database,</text:span></text:p>
      <text:p text:style-name="P22">dns.</text:p>
      <text:p text:style-name="P14"><text:span text:style-name="T3">StabilityReport(Authentication Microservice): </text:span><text:span text:style-name="T7">Deployed secure authentication services using GitLab, Docker and Kubernetes on Windows and Linux environments.</text:span></text:p>
      <text:p text:style-name="P15"><text:span text:style-name="Strong_20_Emphasis">Full Stack Cloud Application </text:span><text:span text:style-name="Strong_20_Emphasis"><text:span text:style-name="T25">with the help of ChatGPT </text:span></text:span><text:span text:style-name="Strong_20_Emphasis">(Java + AWS + AI)</text:span></text:p>
      <text:list xml:id="list3295128333" text:style-name="L8">
        <text:list-item>
          <text:p text:style-name="P37"><text:span text:style-name="T13">Developed a full-stack application using </text:span><text:span text:style-name="Strong_20_Emphasis"><text:span text:style-name="T13">Java (frontend &amp; backend)</text:span></text:span><text:span text:style-name="T13"> integrated with </text:span><text:span text:style-name="Strong_20_Emphasis"><text:span text:style-name="T13">PostgreSQL database</text:span></text:span><text:span text:style-name="T13"> </text:span></text:p>
        </text:list-item>
        <text:list-item>
          <text:p text:style-name="P37"><text:span text:style-name="T13">Deployed the application on </text:span><text:span text:style-name="Strong_20_Emphasis"><text:span text:style-name="T13">AWS EC2</text:span></text:span><text:span text:style-name="T13"> with secure and scalable architecture </text:span></text:p>
        </text:list-item>
        <text:list-item>
          <text:p text:style-name="P37"><text:span text:style-name="T13">Configured </text:span><text:span text:style-name="Strong_20_Emphasis"><text:span text:style-name="T13">Nginx/Apache</text:span></text:span><text:span text:style-name="T13"> for application hosting and traffic management </text:span></text:p>
        </text:list-item>
        <text:list-item>
          <text:p text:style-name="P37"><text:span text:style-name="T13">Implemented </text:span><text:span text:style-name="Strong_20_Emphasis"><text:span text:style-name="T13">database connectivity and authentication system</text:span></text:span><text:span text:style-name="T13"> </text:span></text:p>
        </text:list-item>
        <text:list-item>
          <text:p text:style-name="P36"><text:span text:style-name="T13">Leveraged </text:span><text:span text:style-name="Strong_20_Emphasis"><text:span text:style-name="T13">ChatGPT (AI tool)</text:span></text:span><text:span text:style-name="T13"> for code generation, debugging, and performance optimization </text:span></text:p>
        </text:list-item>
      </text:list>
      <text:h text:style-name="P2" text:outline-level="2"><text:soft-page-break/><text:span text:style-name="Strong_20_Emphasis"><text:span text:style-name="T13">CI/CD &amp; Automation</text:span></text:span></text:h>
      <text:list xml:id="list1371127499" text:style-name="L9">
        <text:list-item>
          <text:p text:style-name="P38"><text:span text:style-name="T13">Designed and implemented CI/CD pipelines using </text:span><text:span text:style-name="Strong_20_Emphasis"><text:span text:style-name="T13">GitLab CI/CD and Jenkins</text:span></text:span><text:span text:style-name="T13">, reducing deployment time by </text:span><text:span text:style-name="Strong_20_Emphasis"><text:span text:style-name="T13">40%</text:span></text:span><text:span text:style-name="T13"> </text:span></text:p>
        </text:list-item>
        <text:list-item>
          <text:p text:style-name="P38"><text:span text:style-name="T13">Configured </text:span><text:span text:style-name="Strong_20_Emphasis"><text:span text:style-name="T13">multibranch pipelines</text:span></text:span><text:span text:style-name="T13"> with automated triggers and </text:span><text:span text:style-name="Strong_20_Emphasis"><text:span text:style-name="T13">Maven integration</text:span></text:span><text:span text:style-name="T13"> for efficient build processes </text:span></text:p>
        </text:list-item>
        <text:list-item>
          <text:p text:style-name="P38"><text:span text:style-name="T13">Automated </text:span><text:span text:style-name="Strong_20_Emphasis"><text:span text:style-name="T13">Docker image build and deployment workflows</text:span></text:span><text:span text:style-name="T13">, pushing images to </text:span><text:span text:style-name="Strong_20_Emphasis"><text:span text:style-name="T13">AWS ECR and Docker Hub</text:span></text:span><text:span text:style-name="T13"> </text:span></text:p>
        </text:list-item>
        <text:list-item>
          <text:p text:style-name="P38"><text:span text:style-name="T13">Implemented </text:span><text:span text:style-name="Strong_20_Emphasis"><text:span text:style-name="T13">environment-based deployments (Dev, QA, Production)</text:span></text:span><text:span text:style-name="T13"> with approval workflows and version control </text:span></text:p>
        </text:list-item>
        <text:list-item>
          <text:p text:style-name="P39"><text:span text:style-name="T13">Reduced </text:span><text:span text:style-name="Strong_20_Emphasis"><text:span text:style-name="T13">manual deployment effort by 60%</text:span></text:span><text:span text:style-name="T13"> through end-to-end automation of build and release processes </text:span></text:p>
        </text:list-item>
      </text:list>
      <text:h text:style-name="P1" text:outline-level="2"><text:span text:style-name="Strong_20_Emphasis"><text:span text:style-name="T13">Containerization &amp; Kubernetes</text:span></text:span></text:h>
      <text:list xml:id="list2770628835" text:style-name="L10">
        <text:list-item>
          <text:p text:style-name="P41"><text:span text:style-name="T13">Containerized microservices using </text:span><text:span text:style-name="Strong_20_Emphasis"><text:span text:style-name="T13">Docker</text:span></text:span><text:span text:style-name="T13"> and optimized Dockerfiles, reducing image size by </text:span><text:span text:style-name="Strong_20_Emphasis"><text:span text:style-name="T13">30%</text:span></text:span><text:span text:style-name="T13"> </text:span></text:p>
        </text:list-item>
        <text:list-item>
          <text:p text:style-name="P41"><text:span text:style-name="T13">Hands-on experience with Docker components: </text:span><text:span text:style-name="Strong_20_Emphasis"><text:span text:style-name="T13">images, containers, networks, volumes, and Dockerfiles</text:span></text:span><text:span text:style-name="T13"> </text:span></text:p>
        </text:list-item>
        <text:list-item>
          <text:p text:style-name="P41"><text:span text:style-name="T13">Deployed and managed applications on Kubernetes clusters across </text:span><text:span text:style-name="Strong_20_Emphasis"><text:span text:style-name="T13">AWS EKS, Azure AKS, and DigitalOcean Kubernetes (DOKS)</text:span></text:span><text:span text:style-name="T13"> </text:span></text:p>
        </text:list-item>
        <text:list-item>
          <text:p text:style-name="P41"><text:span text:style-name="T13">Managed Kubernetes resources including </text:span><text:span text:style-name="Strong_20_Emphasis"><text:span text:style-name="T13">Pods, ReplicaSets, Deployments, StatefulSets, DaemonSets, Services, and Ingress Controllers</text:span></text:span><text:span text:style-name="T13"> </text:span></text:p>
        </text:list-item>
        <text:list-item>
          <text:p text:style-name="P41"><text:span text:style-name="T13">Implemented </text:span><text:span text:style-name="Strong_20_Emphasis"><text:span text:style-name="T13">ConfigMaps, Secrets, Liveness &amp; Readiness Probes</text:span></text:span><text:span text:style-name="T13"> for configuration and health monitoring </text:span></text:p>
        </text:list-item>
        <text:list-item>
          <text:p text:style-name="P41"><text:span text:style-name="T13">Configured </text:span><text:span text:style-name="Strong_20_Emphasis"><text:span text:style-name="T13">Node Selector, Taints &amp; Tolerations, Pod Affinity &amp; Anti-Affinity</text:span></text:span><text:span text:style-name="T13"> for optimized scheduling </text:span></text:p>
        </text:list-item>
        <text:list-item>
          <text:p text:style-name="P41"><text:span text:style-name="T13">Managed </text:span><text:span text:style-name="Strong_20_Emphasis"><text:span text:style-name="T13">Namespaces, RBAC, and Service Accounts</text:span></text:span><text:span text:style-name="T13"> to ensure secure cluster access </text:span></text:p>
        </text:list-item>
        <text:list-item>
          <text:p text:style-name="P40"><text:span text:style-name="T13">Achieved </text:span><text:span text:style-name="Strong_20_Emphasis"><text:span text:style-name="T13">99.9% application uptime</text:span></text:span><text:span text:style-name="T13"> through efficient scaling, monitoring, and resource optimization </text:span></text:p>
        </text:list-item>
      </text:list>
      <text:h text:style-name="P2" text:outline-level="2"><text:span text:style-name="Strong_20_Emphasis"><text:span text:style-name="T13">Monitoring &amp; Reliability (SRE)</text:span></text:span></text:h>
      <text:list xml:id="list2067998201" text:style-name="L11">
        <text:list-item>
          <text:p text:style-name="P42"><text:span text:style-name="T13">Monitored production systems using </text:span><text:span text:style-name="Strong_20_Emphasis"><text:span text:style-name="T13">Prometheus and Grafana dashboards</text:span></text:span><text:span text:style-name="T13"> to ensure high availability and performance </text:span></text:p>
        </text:list-item>
        <text:list-item>
          <text:p text:style-name="P42"><text:span text:style-name="T13">Tracked and analyzed key system metrics (</text:span><text:span text:style-name="Strong_20_Emphasis"><text:span text:style-name="T13">CPU, Memory, Disk, Network</text:span></text:span><text:span text:style-name="T13">) to proactively resolve performance bottlenecks </text:span></text:p>
        </text:list-item>
        <text:list-item>
          <text:p text:style-name="P42"><text:span text:style-name="T13">Implemented centralized logging using </text:span><text:span text:style-name="Strong_20_Emphasis"><text:span text:style-name="T13">Loki</text:span></text:span><text:span text:style-name="T13">, improving issue detection and troubleshooting efficiency </text:span></text:p>
        </text:list-item>
        <text:list-item>
          <text:p text:style-name="P42"><text:span text:style-name="T13">Configured </text:span><text:span text:style-name="Strong_20_Emphasis"><text:span text:style-name="T13">alerting mechanisms</text:span></text:span><text:span text:style-name="T13"> for proactive incident response and reduced downtime </text:span></text:p>
        </text:list-item>
        <text:list-item>
          <text:p text:style-name="P42"><text:span text:style-name="T13">Reduced production incidents by </text:span><text:span text:style-name="Strong_20_Emphasis"><text:span text:style-name="T13">35%</text:span></text:span><text:span text:style-name="T13"> through effective monitoring and alert optimization </text:span></text:p>
        </text:list-item>
        <text:list-item>
          <text:p text:style-name="P43"><text:span text:style-name="T13">Ensured </text:span><text:span text:style-name="Strong_20_Emphasis"><text:span text:style-name="T13">SLA compliance</text:span></text:span><text:span text:style-name="T13"> and maintained system reliability with minimal downtime </text:span></text:p>
        </text:list-item>
      </text:list>
      <text:p text:style-name="P44"><text:span text:style-name="Strong_20_Emphasis"><text:span text:style-name="T14">EDUCATION</text:span></text:span></text:p>
      <text:p text:style-name="P27"><text:span text:style-name="Strong_20_Emphasis"><text:span text:style-name="T13">Bachelor of Technology (Mechanical Engineering)</text:span></text:span><text:span text:style-name="T13"><text:line-break/>Sri Chundi Ranganayakulu Engineering College | 202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873cm" fo:margin-right="0.52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0T11:07:19.690216098</meta:creation-date>
    <dc:date>2026-04-20T12:50:24.017057023</dc:date>
    <meta:editing-duration>PT5M31S</meta:editing-duration>
    <meta:editing-cycles>1</meta:editing-cycles>
    <meta:document-statistic meta:table-count="0" meta:image-count="0" meta:object-count="0" meta:page-count="2" meta:paragraph-count="59" meta:word-count="520" meta:character-count="4578" meta:non-whitespace-character-count="3643"/>
    <meta:generator>LibreOffice/7.3.7.2$Linux_X86_64 LibreOffice_project/30$Build-2</meta:generator>
  </office:meta>
</office:document-meta>
</file>